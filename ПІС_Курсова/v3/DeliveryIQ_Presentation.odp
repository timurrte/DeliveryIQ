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00000010069FFFDB2.png" manifest:media-type="image/png"/>
  <manifest:file-entry manifest:full-path="Pictures/1000000100000100000001000F1D1873.png" manifest:media-type="image/png"/>
  <manifest:file-entry manifest:full-path="Pictures/1000000100000100000001008B84CF18.png" manifest:media-type="image/png"/>
  <manifest:file-entry manifest:full-path="Pictures/1000000100000100000001008234DD5B.png" manifest:media-type="image/png"/>
  <manifest:file-entry manifest:full-path="Pictures/1000000100000100000001007FB48597.png" manifest:media-type="image/png"/>
  <manifest:file-entry manifest:full-path="Pictures/1000000100000100000001008F1BB7E1.png" manifest:media-type="image/png"/>
  <manifest:file-entry manifest:full-path="Pictures/TablePreview1.svm" manifest:media-type=""/>
  <manifest:file-entry manifest:full-path="Pictures/100000010000010000000100824425F4.png" manifest:media-type="image/png"/>
  <manifest:file-entry manifest:full-path="Pictures/100000010000010000000100027BD05C.png" manifest:media-type="image/png"/>
  <manifest:file-entry manifest:full-path="Pictures/1000000100000100000001005AB13AE0.png" manifest:media-type="image/png"/>
  <manifest:file-entry manifest:full-path="Pictures/100000010000010000000100C46693E5.png" manifest:media-type="image/png"/>
  <manifest:file-entry manifest:full-path="Pictures/10000001000001000000010077E5F49F.png" manifest:media-type="image/png"/>
  <manifest:file-entry manifest:full-path="Pictures/1000000000000371000003B193D6D2BF.png" manifest:media-type="image/png"/>
  <manifest:file-entry manifest:full-path="Pictures/10000000000006C7000002FE3531821F.png" manifest:media-type="image/png"/>
  <manifest:file-entry manifest:full-path="Pictures/1000000100000100000001002AA9B140.png" manifest:media-type="image/png"/>
  <manifest:file-entry manifest:full-path="Pictures/100000010000010000000100EFB236DF.png" manifest:media-type="image/png"/>
  <manifest:file-entry manifest:full-path="Pictures/1000000100000100000001007758998D.png" manifest:media-type="image/png"/>
  <manifest:file-entry manifest:full-path="Pictures/100000010000010000000100FF674785.png" manifest:media-type="image/png"/>
  <manifest:file-entry manifest:full-path="Pictures/1000000100000100000001003EBEE120.png" manifest:media-type="image/png"/>
  <manifest:file-entry manifest:full-path="Pictures/1000000100000100000001004A26C9B7.png" manifest:media-type="image/png"/>
  <manifest:file-entry manifest:full-path="Pictures/100000010000010000000100AFB1BC56.png" manifest:media-type="image/png"/>
  <manifest:file-entry manifest:full-path="Pictures/100000010000010000000100C79130F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a1628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14b8a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cm" draw:fill="solid" draw:fill-color="#0e7c86" draw:opacity="7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none" svg:stroke-width="0cm" draw:fill="solid" draw:fill-color="#14b8a6" draw:opacity="6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gr1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f0fdfa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5cm" draw:shadow-offset-y="0.05cm" draw:shadow-color="#000000" draw:shadow-opacity="12%" loext:shadow-blur="0.212cm" loext:decorative="false"/>
    </style:style>
    <style:style style:name="gr13" style:family="graphic" style:parent-style-name="standard">
      <style:graphic-properties draw:stroke="none" svg:stroke-width="0cm" draw:fill="solid" draw:fill-color="#0e7c8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89cm" fo:min-width="5.842cm" fo:padding-top="0cm" fo:padding-bottom="0cm" fo:padding-left="0cm" fo:padding-right="0cm" fo:wrap-option="wrap" loext:decorative="false"/>
      <style:paragraph-properties style:writing-mode="lr-tb"/>
    </style:style>
    <style:style style:name="gr2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7" style:family="graphic" style:parent-style-name="standard">
      <style:graphic-properties draw:stroke="none" svg:stroke-width="0cm" draw:fill="solid" draw:fill-color="#0a1628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5cm" draw:shadow-offset-y="0.05cm" draw:shadow-color="#000000" draw:shadow-opacity="12%" loext:shadow-blur="0.212cm" loext:decorative="false"/>
    </style:style>
    <style:style style:name="gr2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" style:family="graphic" style:parent-style-name="standard">
      <style:graphic-properties loext:decorative="false"/>
    </style:style>
    <style:style style:name="gr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" style:family="graphic" style:parent-style-name="standard">
      <style:graphic-properties draw:stroke="none" svg:stroke-width="0cm" draw:fill="solid" draw:fill-color="#0e7c86" draw:opacity="8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" style:family="graphic" style:parent-style-name="standard">
      <style:graphic-properties draw:stroke="none" svg:stroke-width="0cm" draw:fill="solid" draw:fill-color="#f59e0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8" style:family="graphic" style:parent-style-name="standard">
      <style:graphic-properties draw:stroke="none" svg:stroke-width="0cm" draw:fill="solid" draw:fill-color="#f0fdfa" draw:textarea-vertical-align="top" draw:auto-grow-height="false" fo:min-height="10.673cm" fo:min-width="9.661cm" fo:padding-top="0.125cm" fo:padding-bottom="0.125cm" fo:padding-left="0.25cm" fo:padding-right="0.25cm" fo:wrap-option="wrap" draw:shadow="visible" draw:shadow-offset-x="-0.05cm" draw:shadow-offset-y="0.05cm" draw:shadow-color="#000000" draw:shadow-opacity="12%" loext:shadow-blur="0.212cm" loext:decorative="false"/>
    </style:style>
    <style:style style:name="gr5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8" style:family="graphic" style:parent-style-name="standard">
      <style:graphic-properties draw:stroke="none" svg:stroke-width="0cm" draw:fill="solid" draw:fill-color="#f0fdfa" draw:textarea-vertical-align="top" draw:auto-grow-height="false" fo:min-height="10.419cm" fo:min-width="22.106cm" fo:padding-top="0.125cm" fo:padding-bottom="0.125cm" fo:padding-left="0.25cm" fo:padding-right="0.25cm" fo:wrap-option="wrap" draw:shadow="visible" draw:shadow-offset-x="-0.05cm" draw:shadow-offset-y="0.05cm" draw:shadow-color="#000000" draw:shadow-opacity="12%" loext:shadow-blur="0.212cm" loext:decorative="false"/>
    </style:style>
    <style:style style:name="gr6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0" style:family="graphic" style:parent-style-name="standard">
      <style:graphic-properties draw:stroke="solid" svg:stroke-width="0.035cm" svg:stroke-color="#e2e8f0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5cm" draw:shadow-offset-y="0.05cm" draw:shadow-color="#000000" draw:shadow-opacity="12%" loext:shadow-blur="0.212cm" loext:decorative="false"/>
    </style:style>
    <style:style style:name="gr7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3" style:family="graphic" style:parent-style-name="standard">
      <style:graphic-properties draw:stroke="none" svg:stroke-width="0cm" draw:fill="solid" draw:fill-color="#0d2b4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9" style:family="graphic" style:parent-style-name="standard">
      <style:graphic-properties draw:stroke="none" svg:stroke-width="0cm" draw:fill="solid" draw:fill-color="#0a162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1" style:family="graphic" style:parent-style-name="standard">
      <style:graphic-properties draw:stroke="solid" svg:stroke-width="0.035cm" svg:stroke-color="#0e7c86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3" style:family="graphic" style:parent-style-name="standard">
      <style:graphic-properties draw:stroke="none" svg:stroke-width="0cm" draw:fill="solid" draw:fill-color="#0a1628" draw:textarea-vertical-align="top" draw:auto-grow-height="false" fo:min-height="1.909cm" fo:min-width="21.852cm" fo:padding-top="0.125cm" fo:padding-bottom="0.125cm" fo:padding-left="0.25cm" fo:padding-right="0.25cm" fo:wrap-option="wrap" draw:shadow="visible" draw:shadow-offset-x="-0.05cm" draw:shadow-offset-y="0.05cm" draw:shadow-color="#000000" draw:shadow-opacity="12%" loext:shadow-blur="0.212cm" loext:decorative="false"/>
      <style:paragraph-properties style:writing-mode="lr-tb"/>
    </style:style>
    <style:style style:name="gr11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10.16cm" fo:padding-top="0cm" fo:padding-bottom="0cm" fo:padding-left="0cm" fo:padding-right="0cm" fo:wrap-option="wrap" loext:decorative="false"/>
      <style:paragraph-properties style:writing-mode="lr-tb"/>
    </style:style>
    <style:style style:name="gr11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89cm" fo:min-width="17.78cm" fo:padding-top="0cm" fo:padding-bottom="0cm" fo:padding-left="0cm" fo:padding-right="0cm" fo:wrap-option="wrap" loext:decorative="false"/>
      <style:paragraph-properties style:writing-mode="lr-tb"/>
    </style:style>
    <style:style style:name="gr1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pr1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6.096cm" style:use-optimal-column-width="false"/>
    </style:style>
    <style:style style:name="co2" style:family="table-column">
      <style:table-column-properties style:column-width="8.128cm" style:use-optimal-column-width="false"/>
    </style:style>
    <style:style style:name="ro1" style:family="table-row">
      <style:table-row-properties style:row-height="1.745cm" style:use-optimal-row-height="false"/>
    </style:style>
    <style:style style:name="ro2" style:family="table-row">
      <style:table-row-properties style:row-height="1.75cm" style:use-optimal-row-height="false"/>
    </style:style>
    <style:style style:name="ce1" style:family="table-cell">
      <loext:graphic-properties draw:fill="solid" draw:fill-color="#0e7c86" draw:textarea-vertical-align="middle" fo:padding-top="0.127cm" fo:padding-bottom="0.127cm" fo:padding-left="0.254cm" fo:padding-right="0.254cm"/>
      <style:paragraph-properties fo:border="0.26pt solid #e2e8f0" style:font-independent-line-spacing="true"/>
    </style:style>
    <style:style style:name="ce2" style:family="table-cell">
      <loext:graphic-properties draw:fill="solid" draw:fill-color="#f0fdfa" draw:textarea-vertical-align="top" fo:padding-top="0.127cm" fo:padding-bottom="0.127cm" fo:padding-left="0.254cm" fo:padding-right="0.254cm"/>
      <style:paragraph-properties fo:border="0.26pt solid #e2e8f0" style:font-independent-line-spacing="true"/>
    </style:style>
    <style:style style:name="ce3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26pt solid #e2e8f0" style:font-independent-line-spacing="true"/>
    </style:style>
    <style:style style:name="P1" style:family="paragraph">
      <loext:graphic-properties draw:fill="solid" draw:fill-color="#14b8a6"/>
      <style:paragraph-properties fo:text-align="left"/>
      <style:text-properties fo:font-size="18pt"/>
    </style:style>
    <style:style style:name="P2" style:family="paragraph">
      <loext:graphic-properties draw:fill="solid" draw:fill-color="#0e7c86" draw:opacity="70%"/>
      <style:paragraph-properties fo:text-align="left"/>
      <style:text-properties fo:font-size="18pt"/>
    </style:style>
    <style:style style:name="P3" style:family="paragraph">
      <loext:graphic-properties draw:fill="solid" draw:fill-color="#14b8a6" draw:opacity="60%"/>
      <style:paragraph-properties fo:text-align="left"/>
      <style:text-properties fo:font-size="18pt"/>
    </style:style>
    <style:style style:name="P4" style:family="paragraph">
      <loext:graphic-properties draw:fill="none"/>
      <style:paragraph-properties fo:text-align="lef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3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30%" fo:text-align="lef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solid" draw:fill-color="#f0fdfa"/>
      <style:paragraph-properties fo:text-align="left"/>
      <style:text-properties fo:font-size="18pt"/>
    </style:style>
    <style:style style:name="P13" style:family="paragraph">
      <loext:graphic-properties draw:fill="solid" draw:fill-color="#0e7c86"/>
      <style:paragraph-properties fo:text-align="left"/>
      <style:text-properties fo:font-size="18pt"/>
    </style:style>
    <style:style style:name="P14" style:family="paragraph">
      <style:paragraph-properties fo:margin-left="0cm" fo:margin-right="0cm" fo:margin-top="0cm" fo:margin-bottom="0cm" fo:line-height="15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50%" fo:text-align="lef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loext:graphic-properties draw:fill="solid" draw:fill-color="#0a1628"/>
      <style:paragraph-properties fo:text-align="left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solid" draw:fill-color="#0e7c86" draw:opacity="80%"/>
      <style:paragraph-properties fo:text-align="left"/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solid" draw:fill-color="#f59e0b"/>
      <style:paragraph-properties fo:text-align="left"/>
      <style:text-properties fo:font-size="18pt"/>
    </style:style>
    <style:style style:name="P21" style:family="paragraph">
      <style:paragraph-properties fo:margin-left="0cm" fo:margin-right="0cm" fo:margin-top="0cm" fo:margin-bottom="0cm" fo:line-height="16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60%" fo:text-align="lef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style:paragraph-properties fo:text-align="center"/>
    </style:style>
    <style:style style:name="P24" style:family="paragraph">
      <loext:graphic-properties draw:fill="solid" draw:fill-color="#ffffff"/>
      <style:paragraph-properties fo:text-align="left"/>
      <style:text-properties fo:font-size="18pt"/>
    </style:style>
    <style:style style:name="P25" style:family="paragraph">
      <loext:graphic-properties draw:fill="solid" draw:fill-color="#0d2b4e"/>
      <style:paragraph-properties fo:text-align="left"/>
      <style:text-properties fo:font-size="18pt"/>
    </style:style>
    <style:style style:name="P26" style:family="paragraph">
      <style:paragraph-properties fo:margin-left="0cm" fo:margin-right="0cm" fo:margin-top="0cm" fo:margin-bottom="0cm" fo:line-height="14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40%" fo:text-align="lef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style:paragraph-properties fo:text-align="left"/>
      <style:text-properties fo:font-size="18pt"/>
    </style:style>
    <style:style style:name="P29" style:family="paragraph">
      <style:paragraph-properties fo:margin-left="0cm" fo:margin-right="0cm" fo:margin-top="0cm" fo:margin-bottom="0cm" fo:line-height="14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4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48pt" fo:letter-spacing="normal" fo:language="en" fo:country="US" fo:font-style="normal" style:text-underline-style="none" fo:font-weight="bold" fo:background-color="transparent" style:font-name-asian="Georgia1" style:font-size-asian="48pt" style:font-style-asian="normal" style:font-weight-asian="bold" style:font-name-complex="Georgia" style:font-size-complex="48pt" style:font-style-complex="normal" style:font-weight-complex="bold"/>
    </style:style>
    <style:style style:name="T2" style:family="text">
      <style:text-properties fo:font-variant="normal" fo:text-transform="none" fo:color="#5eead4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Calibri2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3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1" fo:font-size="14pt" fo:letter-spacing="normal" fo:language="en" fo:country="US" fo:font-style="italic" style:text-underline-style="none" fo:font-weight="normal" fo:background-color="transparent" style:font-name-asian="Calibri2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T4" style:family="text">
      <style:text-properties fo:font-variant="normal" fo:text-transform="none" fo:color="#e2e8f0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5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a1628" loext:opacity="100%" style:text-outline="false" style:text-line-through-style="none" style:text-line-through-type="none" style:text-position="0% 100%" style:font-name="Georgia" fo:font-size="32pt" fo:letter-spacing="normal" fo:language="en" fo:country="US" fo:font-style="normal" style:text-underline-style="none" fo:font-weight="bold" fo:background-color="transparent" style:font-name-asian="Georgia1" style:font-size-asian="32pt" style:font-style-asian="normal" style:font-weight-asian="bold" style:font-name-complex="Georgia" style:font-size-complex="32pt" style:font-style-complex="normal" style:font-weight-complex="bold"/>
    </style:style>
    <style:style style:name="T8" style:family="text">
      <style:text-properties fo:font-variant="normal" fo:text-transform="none" fo:color="#0e7c86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1" style:font-size-complex="16pt" style:font-style-complex="normal" style:font-weight-complex="bold"/>
    </style:style>
    <style:style style:name="T9" style:family="text">
      <style:text-properties fo:font-variant="normal" fo:text-transform="none" fo:color="#334155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0" style:family="text">
      <style:text-properties fo:font-variant="normal" fo:text-transform="none" fo:color="#0e7c86" loext:opacity="100%" style:text-outline="false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bold" fo:background-color="transparent" style:font-name-asian="Calibri2" style:font-size-asian="15pt" style:font-style-asian="normal" style:font-weight-asian="bold" style:font-name-complex="Calibri1" style:font-size-complex="15pt" style:font-style-complex="normal" style:font-weight-complex="bold"/>
    </style:style>
    <style:style style:name="T11" style:family="text">
      <style:text-properties fo:font-variant="normal" fo:text-transform="none" fo:color="#0a1628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bold" fo:background-color="transparent" style:font-name-asian="Consolas1" style:font-size-asian="18pt" style:font-style-asian="normal" style:font-weight-asian="bold" style:font-name-complex="Consolas" style:font-size-complex="18pt" style:font-style-complex="normal" style:font-weight-complex="bold"/>
    </style:style>
    <style:style style:name="T12" style:family="text">
      <style:text-properties fo:font-variant="normal" fo:text-transform="none" fo:color="#334155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1" style:font-size-complex="13pt" style:font-style-complex="normal" style:font-weight-complex="bold"/>
    </style:style>
    <style:style style:name="T13" style:family="text">
      <style:text-properties fo:font-variant="normal" fo:text-transform="none" fo:color="#334155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14" style:family="text">
      <style:text-properties fo:font-variant="normal" fo:text-transform="none" fo:color="#0a1628" loext:opacity="100%" style:text-outline="false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bold" fo:background-color="transparent" style:font-name-asian="Consolas1" style:font-size-asian="16pt" style:font-style-asian="normal" style:font-weight-asian="bold" style:font-name-complex="Consolas" style:font-size-complex="16pt" style:font-style-complex="normal" style:font-weight-complex="bold"/>
    </style:style>
    <style:style style:name="T15" style:family="text">
      <style:text-properties fo:font-variant="normal" fo:text-transform="none" fo:color="#334155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6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bold" fo:background-color="transparent" style:font-name-asian="Calibri2" style:font-size-asian="15pt" style:font-style-asian="normal" style:font-weight-asian="bold" style:font-name-complex="Calibri1" style:font-size-complex="15pt" style:font-style-complex="normal" style:font-weight-complex="bold"/>
    </style:style>
    <style:style style:name="T17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bold" fo:background-color="transparent" style:font-name-asian="Calibri2" style:font-size-asian="12pt" style:font-style-asian="italic" style:font-weight-asian="bold" style:font-name-complex="Calibri1" style:font-size-complex="12pt" style:font-style-complex="italic" style:font-weight-complex="bold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1" style:font-size-complex="13pt" style:font-style-complex="normal" style:font-weight-complex="bold"/>
    </style:style>
    <style:style style:name="T19" style:family="text">
      <style:text-properties fo:font-variant="normal" fo:text-transform="none" fo:color="#0f172a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1" style:font-size-complex="12pt" style:font-style-complex="normal" style:font-weight-complex="bold"/>
    </style:style>
    <style:style style:name="T20" style:family="text">
      <style:text-properties fo:font-variant="normal" fo:text-transform="none" fo:color="#0a1628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1" style:font-size-complex="14pt" style:font-style-complex="normal" style:font-weight-complex="bold"/>
    </style:style>
    <style:style style:name="T21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2" style:family="text">
      <style:text-properties fo:font-variant="normal" fo:text-transform="none" fo:color="#0a1628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1" style:font-size-complex="12pt" style:font-style-complex="normal" style:font-weight-complex="bold"/>
    </style:style>
    <style:style style:name="T23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24" style:family="text">
      <style:text-properties fo:font-variant="normal" fo:text-transform="none" fo:color="#0a1628" loext:opacity="100%" style:text-outline="false" style:text-line-through-style="none" style:text-line-through-type="none" style:text-position="0% 100%" style:font-name="Georgia" fo:font-size="30pt" fo:letter-spacing="normal" fo:language="en" fo:country="US" fo:font-style="normal" style:text-underline-style="none" fo:font-weight="bold" fo:background-color="transparent" style:font-name-asian="Georgia1" style:font-size-asian="30pt" style:font-style-asian="normal" style:font-weight-asian="bold" style:font-name-complex="Georgia" style:font-size-complex="30pt" style:font-style-complex="normal" style:font-weight-complex="bold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" fo:font-size="13pt" fo:letter-spacing="normal" fo:language="en" fo:country="US" fo:font-style="normal" style:text-underline-style="none" fo:font-weight="bold" fo:background-color="transparent" style:font-name-asian="Consolas1" style:font-size-asian="13pt" style:font-style-asian="normal" style:font-weight-asian="bold" style:font-name-complex="Consolas" style:font-size-complex="13pt" style:font-style-complex="normal" style:font-weight-complex="bold"/>
    </style:style>
    <style:style style:name="T26" style:family="text">
      <style:text-properties fo:font-variant="normal" fo:text-transform="none" fo:color="#334155" loext:opacity="100%" style:text-outline="false" style:text-line-through-style="none" style:text-line-through-type="none" style:text-position="0% 100%" style:font-name="Consolas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27" style:family="text">
      <style:text-properties fo:font-variant="normal" fo:text-transform="none" fo:color="#0a1628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bold" fo:background-color="transparent" style:font-name-asian="Consolas1" style:font-size-asian="12pt" style:font-style-asian="normal" style:font-weight-asian="bold" style:font-name-complex="Consolas" style:font-size-complex="12pt" style:font-style-complex="normal" style:font-weight-complex="bold"/>
    </style:style>
    <style:style style:name="T28" style:family="text">
      <style:text-properties fo:font-variant="normal" fo:text-transform="none" fo:color="#0a1628" loext:opacity="100%" style:text-outline="false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bold" fo:background-color="transparent" style:font-name-asian="Calibri2" style:font-size-asian="15pt" style:font-style-asian="normal" style:font-weight-asian="bold" style:font-name-complex="Calibri1" style:font-size-complex="15pt" style:font-style-complex="normal" style:font-weight-complex="bold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name-asian="Calibri2" style:font-size-asian="18pt" style:font-style-asian="normal" style:font-weight-asian="bold" style:font-name-complex="Calibri1" style:font-size-complex="18pt" style:font-style-complex="normal" style:font-weight-complex="bold"/>
    </style:style>
    <style:style style:name="T30" style:family="text">
      <style:text-properties fo:font-variant="normal" fo:text-transform="none" fo:color="#0a1628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1" style:font-size-complex="16pt" style:font-style-complex="normal" style:font-weight-complex="bold"/>
    </style:style>
    <style:style style:name="T31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bold" fo:background-color="transparent" style:font-name-asian="Consolas1" style:font-size-asian="12pt" style:font-style-asian="normal" style:font-weight-asian="bold" style:font-name-complex="Consolas" style:font-size-complex="12pt" style:font-style-complex="normal" style:font-weight-complex="bold"/>
    </style:style>
    <style:style style:name="T32" style:family="text">
      <style:text-properties fo:font-variant="normal" fo:text-transform="none" fo:color="#0e7c86" loext:opacity="100%" style:text-outline="false" style:text-line-through-style="none" style:text-line-through-type="none" style:text-position="0% 100%" style:font-name="Consolas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33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1" style:font-size-complex="14pt" style:font-style-complex="normal" style:font-weight-complex="bold"/>
    </style:style>
    <style:style style:name="T34" style:family="text">
      <style:text-properties fo:font-variant="normal" fo:text-transform="none" fo:color="#e2e8f0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5" style:family="text">
      <style:text-properties fo:font-variant="normal" fo:text-transform="none" fo:color="#334155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36pt" fo:letter-spacing="normal" fo:language="en" fo:country="US" fo:font-style="normal" style:text-underline-style="none" fo:font-weight="bold" fo:background-color="transparent" style:font-name-asian="Georgia1" style:font-size-asian="36pt" style:font-style-asian="normal" style:font-weight-asian="bold" style:font-name-complex="Georgia" style:font-size-complex="36pt" style:font-style-complex="normal" style:font-weight-complex="bold"/>
    </style:style>
    <style:style style:name="T37" style:family="text">
      <style:text-properties fo:font-variant="normal" fo:text-transform="none" fo:color="#e2e8f0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eead4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64748b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e2e8f0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a1628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e7c86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334155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14b8a6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59e0b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f172a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6.349cm" svg:height="6.349cm" svg:x="19.812cm" svg:y="1.2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" draw:style-name="gr3" draw:text-style-name="P3" draw:layer="layout" svg:width="4.571cm" svg:height="4.571cm" svg:x="21.082cm" svg:y="2.03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4" draw:text-style-name="P4" draw:layer="layout" svg:width="2.793cm" svg:height="2.793cm" svg:x="21.971cm" svg:y="2.921cm">
          <draw:image xlink:href="Pictures/10000001000001000000010069FFFDB2.png" xlink:type="simple" xlink:show="embed" xlink:actuate="onLoad" draw:mime-type="image/png">
            <text:p/>
          </draw:image>
          <svg:desc>preencoded.png</svg:desc>
        </draw:frame>
        <draw:custom-shape draw:name="Text 3" draw:style-name="gr5" draw:text-style-name="P6" draw:layer="layout" svg:width="19.049cm" svg:height="3.047cm" svg:x="1.778cm" svg:y="2.54cm">
          <text:p text:style-name="P5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" draw:text-style-name="P8" draw:layer="layout" svg:width="19.049cm" svg:height="3.809cm" svg:x="1.778cm" svg:y="5.588cm">
          <text:p text:style-name="P7"><text:span text:style-name="T2">Курсова робота на тему:</text:span></text:p>
          <text:p text:style-name="P7"><text:span text:style-name="T2">“Проєктування інформаційної системи</text:span></text:p>
          <text:p text:style-name="P7"><text:span text:style-name="T2">оптимізації розподілу вантажів</text:span></text:p>
          <text:p text:style-name="P7"><text:span text:style-name="T2">у транспортній мережі”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" draw:text-style-name="P1" draw:layer="layout" svg:width="5.079cm" svg:height="0.075cm" svg:x="1.778cm" svg:y="10.1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6" draw:layer="layout" svg:width="12.699cm" svg:height="1.015cm" svg:x="1.778cm" svg:y="10.668cm">
          <text:p text:style-name="P5"><text:span text:style-name="T3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" draw:text-style-name="P6" draw:layer="layout" svg:width="20.319cm" svg:height="1.015cm" svg:x="1.778cm" svg:y="11.05cm">
          <text:p text:style-name="P5"><text:span text:style-name="T4">Виконав студент групи 4-КН-22</text:span></text:p>
          <text:p text:style-name="P5"><text:span text:style-name="T4">Ніколаєв Т. О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9" draw:text-style-name="P6" draw:layer="layout" svg:width="20.319cm" svg:height="0.888cm" svg:x="1.778cm" svg:y="12.7cm">
          <text:p text:style-name="P5"><text:span text:style-name="T5">Кафедра інформаційних систем</text:span></text:p>
          <text:p text:style-name="P5"><text:span text:style-name="T5">Дніпро, <text:s/>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1</text:page-number></text:span></text:p>
            </draw:text-box>
          </draw:frame>
        </presentation:notes>
      </draw:page>
      <draw:page draw:name="page2" draw:style-name="dp3" draw:master-page-name="DEFAULT">
        <draw:custom-shape draw:name="Text 0" draw:style-name="gr11" draw:text-style-name="P6" draw:layer="layout" svg:width="22.859cm" svg:height="1.523cm" svg:x="1.524cm" svg:y="0.889cm">
          <text:p text:style-name="P5"><text:span text:style-name="T7">Мета та завдання роботи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2" draw:text-style-name="P12" draw:layer="layout" svg:width="22.351cm" svg:height="2.92cm" svg:x="1.524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3" draw:text-style-name="P13" draw:layer="layout" svg:width="0.177cm" svg:height="2.92cm" svg:x="1.524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4" draw:text-style-name="P4" draw:layer="layout" svg:width="1.269cm" svg:height="1.269cm" svg:x="2.413cm" svg:y="4.064cm">
          <draw:image xlink:href="Pictures/1000000100000100000001000F1D1873.png" xlink:type="simple" xlink:show="embed" xlink:actuate="onLoad" draw:mime-type="image/png">
            <text:p/>
          </draw:image>
          <svg:desc>preencoded.png</svg:desc>
        </draw:frame>
        <draw:custom-shape draw:name="Text 3" draw:style-name="gr14" draw:text-style-name="P6" draw:layer="layout" svg:width="18.541cm" svg:height="0.888cm" svg:x="4.191cm" svg:y="3.556cm">
          <text:p text:style-name="P5"><text:span text:style-name="T8">Мета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5" draw:text-style-name="P6" draw:layer="layout" svg:width="18.541cm" svg:height="1.396cm" svg:x="4.191cm" svg:y="4.445cm">
          <text:p text:style-name="P5"><text:span text:style-name="T9">Проєктування інформаційної системи оптимізації маршрутів доставки з використанням ООП та UM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2" draw:text-style-name="P12" draw:layer="layout" svg:width="22.351cm" svg:height="2.92cm" svg:x="1.524cm" svg:y="6.8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3" draw:text-style-name="P13" draw:layer="layout" svg:width="0.177cm" svg:height="2.92cm" svg:x="1.524cm" svg:y="6.8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" draw:text-style-name="P4" draw:layer="layout" svg:width="1.269cm" svg:height="1.269cm" svg:x="2.413cm" svg:y="7.62cm">
          <draw:image xlink:href="Pictures/1000000100000100000001008234DD5B.png" xlink:type="simple" xlink:show="embed" xlink:actuate="onLoad" draw:mime-type="image/png">
            <text:p/>
          </draw:image>
          <svg:desc>preencoded.png</svg:desc>
        </draw:frame>
        <draw:custom-shape draw:name="Text 7" draw:style-name="gr16" draw:text-style-name="P6" draw:layer="layout" svg:width="18.541cm" svg:height="0.888cm" svg:x="4.191cm" svg:y="7.112cm">
          <text:p text:style-name="P5"><text:span text:style-name="T8">Об'єкт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7" draw:text-style-name="P6" draw:layer="layout" svg:width="18.541cm" svg:height="1.396cm" svg:x="4.191cm" svg:y="8.001cm">
          <text:p text:style-name="P5"><text:span text:style-name="T9">Оптимізація маршрутів доставки вантажів у міській транспортній мережі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2" draw:text-style-name="P12" draw:layer="layout" svg:width="22.351cm" svg:height="2.92cm" svg:x="1.524cm" svg:y="10.41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3" draw:text-style-name="P13" draw:layer="layout" svg:width="0.177cm" svg:height="2.92cm" svg:x="1.524cm" svg:y="10.41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" draw:text-style-name="P4" draw:layer="layout" svg:width="1.269cm" svg:height="1.269cm" svg:x="2.413cm" svg:y="11.176cm">
          <draw:image xlink:href="Pictures/1000000100000100000001008B84CF18.png" xlink:type="simple" xlink:show="embed" xlink:actuate="onLoad" draw:mime-type="image/png">
            <text:p/>
          </draw:image>
          <svg:desc>preencoded.png</svg:desc>
        </draw:frame>
        <draw:custom-shape draw:name="Text 11" draw:style-name="gr18" draw:text-style-name="P6" draw:layer="layout" svg:width="18.541cm" svg:height="0.888cm" svg:x="4.191cm" svg:y="10.668cm">
          <text:p text:style-name="P5"><text:span text:style-name="T8">Предмет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9" draw:text-style-name="P6" draw:layer="layout" svg:width="18.541cm" svg:height="1.396cm" svg:x="4.191cm" svg:y="11.557cm">
          <text:p text:style-name="P5"><text:span text:style-name="T9">Інформаційна система оптимізації розподілу вантажів у транспортній мережі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2" presentation:class="page"/>
          <draw:frame draw:name="Notes Placeholder 2" presentation:style-name="pr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1</text:page-number></text:span></text:p>
            </draw:text-box>
          </draw:frame>
        </presentation:notes>
      </draw:page>
      <draw:page draw:name="page3" draw:style-name="dp3" draw:master-page-name="DEFAULT">
        <draw:custom-shape draw:name="Text 0" draw:style-name="gr20" draw:text-style-name="P6" draw:layer="layout" svg:width="22.859cm" svg:height="1.523cm" svg:x="1.524cm" svg:y="0.889cm">
          <text:p text:style-name="P5"><text:span text:style-name="T7">Предметна область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2" draw:text-style-name="P12" draw:layer="layout" svg:width="10.667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1" draw:text-style-name="P6" draw:layer="layout" svg:width="9.651cm" svg:height="0.888cm" svg:x="2.032cm" svg:y="3.429cm">
          <text:p text:style-name="P5"><text:span text:style-name="T10">Мультимодальний граф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2" draw:text-style-name="P6" draw:layer="layout" svg:width="5.841cm" svg:height="0.888cm" svg:x="2.414cm" svg:y="5.08cm">
          <text:p text:style-name="P5"><text:span text:style-name="T11">G = (V, E, Φ, Ψ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3" draw:text-style-name="P15" draw:layer="layout" svg:width="9.651cm" svg:height="5.587cm" svg:x="2.032cm" svg:y="5.715cm">
          <text:p text:style-name="P14"><text:span text:style-name="T12">V</text:span><text:span text:style-name="T13"> — вузли мережі (перехрестя)</text:span></text:p>
          <text:p text:style-name="P14"><text:span text:style-name="T12">E</text:span><text:span text:style-name="T13"> — орієнтовані ребра (дороги)</text:span></text:p>
          <text:p text:style-name="P14"><text:span text:style-name="T12">Φ</text:span><text:span text:style-name="T13"> — атрибути вузлів (координати)</text:span></text:p>
          <text:p text:style-name="P14"><text:span text:style-name="T12">Ψ</text:span><text:span text:style-name="T13"> — атрибути ребер (довжина, типи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2" draw:text-style-name="P12" draw:layer="layout" svg:width="10.667cm" svg:height="4.063cm" svg:x="13.208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4" draw:text-style-name="P6" draw:layer="layout" svg:width="9.651cm" svg:height="0.888cm" svg:x="13.716cm" svg:y="3.429cm">
          <text:p text:style-name="P5"><text:span text:style-name="T10">Типи транспорту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5" draw:text-style-name="P6" draw:layer="layout" svg:width="9.651cm" svg:height="0.888cm" svg:x="13.716cm" svg:y="4.445cm">
          <text:p text:style-name="P5"><text:span text:style-name="T14">T = { Car, Bike, Walk 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6" draw:text-style-name="P6" draw:layer="layout" svg:width="9.651cm" svg:height="1.396cm" svg:x="13.716cm" svg:y="5.461cm">
          <text:p text:style-name="P5"><text:span text:style-name="T15">Кожен тип має швидкість та місткість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7" draw:text-style-name="P16" draw:layer="layout" svg:width="10.667cm" svg:height="4.571cm" svg:x="13.208cm" svg:y="7.6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8" draw:text-style-name="P6" draw:layer="layout" svg:width="9.651cm" svg:height="0.888cm" svg:x="13.716cm" svg:y="8.001cm">
          <text:p text:style-name="P5"><text:span text:style-name="T16">Задача CVR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9" draw:text-style-name="P6" draw:layer="layout" svg:width="9.651cm" svg:height="2.031cm" svg:x="13.716cm" svg:y="9.017cm">
          <text:p text:style-name="P5"><text:span text:style-name="T4">Цільова функція мінімізує зважену суму загального часу доставки та кількості задіяних ТЗ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0" draw:text-style-name="P6" draw:layer="layout" svg:width="9.651cm" svg:height="0.761cm" svg:x="13.716cm" svg:y="10.922cm">
          <text:p text:style-name="P5"><text:span text:style-name="T17">NP-складна задача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3" presentation:class="page"/>
          <draw:frame draw:name="Notes Placeholder 2" presentation:style-name="pr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1</text:page-number></text:span></text:p>
            </draw:text-box>
          </draw:frame>
        </presentation:notes>
      </draw:page>
      <draw:page draw:name="page4" draw:style-name="dp3" draw:master-page-name="DEFAULT">
        <draw:custom-shape draw:name="Text 0" draw:style-name="gr31" draw:text-style-name="P6" draw:layer="layout" svg:width="22.859cm" svg:height="1.523cm" svg:x="1.524cm" svg:y="0.889cm">
          <text:p text:style-name="P5"><text:span text:style-name="T7">Огляд існуючих рішень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32" draw:layer="layout" svg:width="22.351cm" svg:height="6.984cm" svg:x="1.615cm" svg:y="4.445cm">
          <table:table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17"><text:span text:style-name="T18">Рішення</text:span></text:p>
              </table:table-cell>
              <table:table-cell>
                <text:p text:style-name="P17"><text:span text:style-name="T18">Переваги</text:span></text:p>
              </table:table-cell>
              <table:table-cell>
                <text:p text:style-name="P17"><text:span text:style-name="T18">Недоліки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9">Google OR-Tools</text:span></text:p>
              </table:table-cell>
              <table:table-cell>
                <text:p text:style-name="P5"><text:span text:style-name="T15">Потужний фреймворк оптимізації</text:span></text:p>
              </table:table-cell>
              <table:table-cell>
                <text:p text:style-name="P5"><text:span text:style-name="T15">Потрібен досвід, немає UI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9">Route4Me / OptimoRoute</text:span></text:p>
              </table:table-cell>
              <table:table-cell>
                <text:p text:style-name="P5"><text:span text:style-name="T15">Широкий функціонал</text:span></text:p>
              </table:table-cell>
              <table:table-cell>
                <text:p text:style-name="P5"><text:span text:style-name="T15">Висока ціна, закриті алгоритми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19">OSRM / Valhalla</text:span></text:p>
              </table:table-cell>
              <table:table-cell>
                <text:p text:style-name="P5"><text:span text:style-name="T15">Відкриті маршрутизатори OSM</text:span></text:p>
              </table:table-cell>
              <table:table-cell>
                <text:p text:style-name="P5"><text:span text:style-name="T15">Немає VRP, немає мультимодальності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10" draw:layer="layout" svg:width="15.239cm" svg:height="8.572cm" svg:x="1.905cm" svg:y="3.175cm" draw:page-number="4" presentation:class="page"/>
          <draw:frame draw:name="Notes Placeholder 2" presentation:style-name="pr5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5" draw:style-name="dp3" draw:master-page-name="DEFAULT">
        <draw:custom-shape draw:name="Text 0" draw:style-name="gr33" draw:text-style-name="P6" draw:layer="layout" svg:width="22.859cm" svg:height="1.523cm" svg:x="1.524cm" svg:y="0.889cm">
          <text:p text:style-name="P5"><text:span text:style-name="T7">Комплект UML-діаграм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2" draw:text-style-name="P12" draw:layer="layout" svg:width="7.111cm" svg:height="4.571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4" draw:text-style-name="P18" draw:layer="layout" svg:width="1.777cm" svg:height="1.777cm" svg:x="4.064cm" svg:y="3.55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4" draw:text-style-name="P4" draw:layer="layout" svg:width="1.142cm" svg:height="1.142cm" svg:x="4.369cm" svg:y="3.861cm">
          <draw:image xlink:href="Pictures/1000000100000100000001008F1BB7E1.png" xlink:type="simple" xlink:show="embed" xlink:actuate="onLoad" draw:mime-type="image/png">
            <text:p/>
          </draw:image>
          <svg:desc>preencoded.png</svg:desc>
        </draw:frame>
        <draw:custom-shape draw:name="Text 3" draw:style-name="gr35" draw:text-style-name="P19" draw:layer="layout" svg:width="6.349cm" svg:height="0.888cm" svg:x="1.905cm" svg:y="5.588cm">
          <text:p text:style-name="P17"><text:span text:style-name="T20">Прецедентів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6" draw:text-style-name="P19" draw:layer="layout" svg:width="6.349cm" svg:height="0.761cm" svg:x="1.905cm" svg:y="6.477cm">
          <text:p text:style-name="P17"><text:span text:style-name="T21">9 прецедентів, 4 актори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2" draw:text-style-name="P12" draw:layer="layout" svg:width="7.111cm" svg:height="4.571cm" svg:x="9.398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34" draw:text-style-name="P18" draw:layer="layout" svg:width="1.777cm" svg:height="1.777cm" svg:x="11.938cm" svg:y="3.55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4" draw:text-style-name="P4" draw:layer="layout" svg:width="1.142cm" svg:height="1.142cm" svg:x="12.243cm" svg:y="3.861cm">
          <draw:image xlink:href="Pictures/100000010000010000000100824425F4.png" xlink:type="simple" xlink:show="embed" xlink:actuate="onLoad" draw:mime-type="image/png">
            <text:p/>
          </draw:image>
          <svg:desc>preencoded.png</svg:desc>
        </draw:frame>
        <draw:custom-shape draw:name="Text 7" draw:style-name="gr37" draw:text-style-name="P19" draw:layer="layout" svg:width="6.349cm" svg:height="0.888cm" svg:x="9.779cm" svg:y="5.588cm">
          <text:p text:style-name="P17"><text:span text:style-name="T20">Класів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8" draw:text-style-name="P19" draw:layer="layout" svg:width="6.349cm" svg:height="0.761cm" svg:x="9.779cm" svg:y="6.477cm">
          <text:p text:style-name="P17"><text:span text:style-name="T21">7 сутностей, 6 модулів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2" draw:text-style-name="P12" draw:layer="layout" svg:width="7.111cm" svg:height="4.571cm" svg:x="17.272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34" draw:text-style-name="P18" draw:layer="layout" svg:width="1.777cm" svg:height="1.777cm" svg:x="19.812cm" svg:y="3.55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" draw:style-name="gr4" draw:text-style-name="P4" draw:layer="layout" svg:width="1.142cm" svg:height="1.142cm" svg:x="20.117cm" svg:y="3.861cm">
          <draw:image xlink:href="Pictures/1000000100000100000001007FB48597.png" xlink:type="simple" xlink:show="embed" xlink:actuate="onLoad" draw:mime-type="image/png">
            <text:p/>
          </draw:image>
          <svg:desc>preencoded.png</svg:desc>
        </draw:frame>
        <draw:custom-shape draw:name="Text 11" draw:style-name="gr39" draw:text-style-name="P19" draw:layer="layout" svg:width="6.349cm" svg:height="0.888cm" svg:x="17.653cm" svg:y="5.588cm">
          <text:p text:style-name="P17"><text:span text:style-name="T20">Послідовності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0" draw:text-style-name="P19" draw:layer="layout" svg:width="6.349cm" svg:height="0.761cm" svg:x="17.653cm" svg:y="6.477cm">
          <text:p text:style-name="P17"><text:span text:style-name="T21">TSP, геокодування, VR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2" draw:text-style-name="P12" draw:layer="layout" svg:width="7.111cm" svg:height="4.571cm" svg:x="1.524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34" draw:text-style-name="P18" draw:layer="layout" svg:width="1.777cm" svg:height="1.777cm" svg:x="4.064cm" svg:y="8.8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3" draw:style-name="gr4" draw:text-style-name="P4" draw:layer="layout" svg:width="1.142cm" svg:height="1.142cm" svg:x="4.369cm" svg:y="9.195cm">
          <draw:image xlink:href="Pictures/100000010000010000000100027BD05C.png" xlink:type="simple" xlink:show="embed" xlink:actuate="onLoad" draw:mime-type="image/png">
            <text:p/>
          </draw:image>
          <svg:desc>preencoded.png</svg:desc>
        </draw:frame>
        <draw:custom-shape draw:name="Text 15" draw:style-name="gr41" draw:text-style-name="P19" draw:layer="layout" svg:width="6.349cm" svg:height="0.888cm" svg:x="1.905cm" svg:y="10.922cm">
          <text:p text:style-name="P17"><text:span text:style-name="T20">Діяльності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2" draw:text-style-name="P19" draw:layer="layout" svg:width="6.349cm" svg:height="0.761cm" svg:x="1.905cm" svg:y="11.811cm">
          <text:p text:style-name="P17"><text:span text:style-name="T21">Повний цикл оптимізації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2" draw:text-style-name="P12" draw:layer="layout" svg:width="7.111cm" svg:height="4.571cm" svg:x="9.398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34" draw:text-style-name="P18" draw:layer="layout" svg:width="1.777cm" svg:height="1.777cm" svg:x="11.938cm" svg:y="8.8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4" draw:style-name="gr4" draw:text-style-name="P4" draw:layer="layout" svg:width="1.142cm" svg:height="1.142cm" svg:x="12.243cm" svg:y="9.195cm">
          <draw:image xlink:href="Pictures/1000000100000100000001005AB13AE0.png" xlink:type="simple" xlink:show="embed" xlink:actuate="onLoad" draw:mime-type="image/png">
            <text:p/>
          </draw:image>
          <svg:desc>preencoded.png</svg:desc>
        </draw:frame>
        <draw:custom-shape draw:name="Text 19" draw:style-name="gr43" draw:text-style-name="P19" draw:layer="layout" svg:width="6.349cm" svg:height="0.888cm" svg:x="9.779cm" svg:y="10.922cm">
          <text:p text:style-name="P17"><text:span text:style-name="T20">Станів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44" draw:text-style-name="P19" draw:layer="layout" svg:width="6.349cm" svg:height="0.761cm" svg:x="9.779cm" svg:y="11.811cm">
          <text:p text:style-name="P17"><text:span text:style-name="T21">Життєвий цикл пакунку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2" draw:text-style-name="P12" draw:layer="layout" svg:width="7.111cm" svg:height="4.571cm" svg:x="17.272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34" draw:text-style-name="P18" draw:layer="layout" svg:width="1.777cm" svg:height="1.777cm" svg:x="19.812cm" svg:y="8.8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5" draw:style-name="gr4" draw:text-style-name="P4" draw:layer="layout" svg:width="1.142cm" svg:height="1.142cm" svg:x="20.117cm" svg:y="9.195cm">
          <draw:image xlink:href="Pictures/10000001000001000000010077E5F49F.png" xlink:type="simple" xlink:show="embed" xlink:actuate="onLoad" draw:mime-type="image/png">
            <text:p/>
          </draw:image>
          <svg:desc>preencoded.png</svg:desc>
        </draw:frame>
        <draw:custom-shape draw:name="Text 23" draw:style-name="gr45" draw:text-style-name="P19" draw:layer="layout" svg:width="6.349cm" svg:height="0.888cm" svg:x="17.653cm" svg:y="10.922cm">
          <text:p text:style-name="P17"><text:span text:style-name="T20">Компонентів / Розгортання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46" draw:text-style-name="P19" draw:layer="layout" svg:width="6.349cm" svg:height="0.761cm" svg:x="17.653cm" svg:y="11.811cm">
          <text:p text:style-name="P17"><text:span text:style-name="T21">7 модулів, 3 рівні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5" presentation:class="page"/>
          <draw:frame draw:name="Notes Placeholder 2" presentation:style-name="pr6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DEFAULT">
        <draw:custom-shape draw:name="Text 0" draw:style-name="gr47" draw:text-style-name="P6" draw:layer="layout" svg:width="22.859cm" svg:height="1.523cm" svg:x="1.524cm" svg:y="0.889cm">
          <text:p text:style-name="P5"><text:span text:style-name="T7">Діаграма прецедентів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2" draw:text-style-name="P12" draw:layer="layout" svg:width="8.889cm" svg:height="10.159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8" draw:text-style-name="P6" draw:layer="layout" svg:width="7.873cm" svg:height="0.888cm" svg:x="2.032cm" svg:y="3.429cm">
          <text:p text:style-name="P5"><text:span text:style-name="T10">Актори системи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9" draw:text-style-name="P20" draw:layer="layout" svg:width="0.888cm" svg:height="0.888cm" svg:x="2.286cm" svg:y="4.69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" draw:style-name="gr50" draw:text-style-name="P6" draw:layer="layout" svg:width="6.349cm" svg:height="0.558cm" svg:x="3.556cm" svg:y="4.648cm">
          <text:p text:style-name="P5"><text:span text:style-name="T22">Оператор логістики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1" draw:text-style-name="P6" draw:layer="layout" svg:width="6.349cm" svg:height="0.507cm" svg:x="3.556cm" svg:y="5.207cm">
          <text:p text:style-name="P5"><text:span text:style-name="T23">Основний користувач системи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3" draw:text-style-name="P13" draw:layer="layout" svg:width="0.888cm" svg:height="0.888cm" svg:x="2.286cm" svg:y="6.73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7" draw:style-name="gr52" draw:text-style-name="P6" draw:layer="layout" svg:width="6.349cm" svg:height="0.558cm" svg:x="3.556cm" svg:y="6.68cm">
          <text:p text:style-name="P5"><text:span text:style-name="T22">Nominatim AP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3" draw:text-style-name="P6" draw:layer="layout" svg:width="6.349cm" svg:height="0.507cm" svg:x="3.556cm" svg:y="7.239cm">
          <text:p text:style-name="P5"><text:span text:style-name="T23">API для Геокодування адрес OS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3" draw:text-style-name="P13" draw:layer="layout" svg:width="0.888cm" svg:height="0.888cm" svg:x="2.286cm" svg:y="8.76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54" draw:text-style-name="P6" draw:layer="layout" svg:width="6.349cm" svg:height="0.558cm" svg:x="3.556cm" svg:y="8.712cm">
          <text:p text:style-name="P5"><text:span text:style-name="T22">Overpass AP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55" draw:text-style-name="P6" draw:layer="layout" svg:width="6.349cm" svg:height="0.507cm" svg:x="3.556cm" svg:y="9.271cm">
          <text:p text:style-name="P5"><text:span text:style-name="T23">Дані вуличної мережі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3" draw:text-style-name="P13" draw:layer="layout" svg:width="0.888cm" svg:height="0.888cm" svg:x="2.286cm" svg:y="10.79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3" draw:style-name="gr56" draw:text-style-name="P6" draw:layer="layout" svg:width="6.349cm" svg:height="0.558cm" svg:x="3.556cm" svg:y="10.744cm">
          <text:p text:style-name="P5"><text:span text:style-name="T22">Mapbox AP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7" draw:text-style-name="P6" draw:layer="layout" svg:width="6.349cm" svg:height="0.507cm" svg:x="3.556cm" svg:y="11.303cm">
          <text:p text:style-name="P5"><text:span text:style-name="T23">Дані про трафік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58" draw:text-style-name="P12" draw:layer="layout" svg:width="10.16cm" svg:height="10.922cm" svg:x="12.7cm" svg:y="2.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59" draw:text-style-name="P22" draw:layer="layout" svg:width="11.683cm" svg:height="8.127cm" svg:x="11.938cm" svg:y="4.699cm">
          <text:p text:style-name="P21"><text:span text:style-name="T1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23" draw:layer="layout" svg:width="9.003cm" svg:height="9.657cm" svg:x="13.222cm" svg:y="3.17cm">
          <draw:image xlink:href="Pictures/1000000000000371000003B193D6D2BF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0" draw:layer="layout" svg:width="15.239cm" svg:height="8.572cm" svg:x="1.905cm" svg:y="3.175cm" draw:page-number="6" presentation:class="page"/>
          <draw:frame draw:name="Notes Placeholder 2" presentation:style-name="pr7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7" draw:style-name="dp3" draw:master-page-name="DEFAULT">
        <draw:custom-shape draw:name="Text 0" draw:style-name="gr61" draw:text-style-name="P6" draw:layer="layout" svg:width="22.859cm" svg:height="1.523cm" svg:x="1.524cm" svg:y="0.889cm">
          <text:p text:style-name="P5"><text:span text:style-name="T24">Діаграма класів предметної області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2" draw:text-style-name="P19" draw:layer="layout" svg:width="6.349cm" svg:height="1.015cm" svg:x="1.524cm" svg:y="3.048cm">
          <text:p text:style-name="P17"><text:span text:style-name="T25">Loc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3" draw:text-style-name="P6" draw:layer="layout" svg:width="5.587cm" svg:height="2.539cm" svg:x="1.905cm" svg:y="4.318cm">
          <text:p text:style-name="P5"><text:span text:style-name="T26"/></text:p>
          <text:p text:style-name="P5"><text:span text:style-name="T2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64" draw:text-style-name="P19" draw:layer="layout" svg:width="6.349cm" svg:height="1.015cm" svg:x="16.002cm" svg:y="3.048cm">
          <text:p text:style-name="P17"><text:span text:style-name="T25">Vehic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65" draw:text-style-name="P6" draw:layer="layout" svg:width="5.587cm" svg:height="2.539cm" svg:x="1.905cm" svg:y="9.398cm">
          <text:p text:style-name="P5"><text:span text:style-name="T2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66" draw:text-style-name="P19" draw:layer="layout" svg:width="6.349cm" svg:height="1.015cm" svg:x="8.636cm" svg:y="8.128cm">
          <text:p text:style-name="P17"><text:span text:style-name="T25">Packa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67" draw:text-style-name="P6" draw:layer="layout" svg:width="5.587cm" svg:height="2.539cm" svg:x="9.017cm" svg:y="9.398cm">
          <text:p text:style-name="P5"><text:span text:style-name="T2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68" draw:text-style-name="P12" draw:layer="layout" svg:width="22.605cm" svg:height="10.668cm" svg:x="1.525cm" svg:y="2.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23" draw:layer="layout" svg:width="21.011cm" svg:height="9.276cm" svg:x="2.484cm" svg:y="3.175cm">
          <draw:image xlink:href="Pictures/10000000000006C7000002FE3531821F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0" draw:layer="layout" svg:width="15.239cm" svg:height="8.572cm" svg:x="1.905cm" svg:y="3.175cm" draw:page-number="7" presentation:class="page"/>
          <draw:frame draw:name="Notes Placeholder 2" presentation:style-name="pr8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DEFAULT">
        <draw:custom-shape draw:name="Text 0" draw:style-name="gr69" draw:text-style-name="P6" draw:layer="layout" svg:width="22.859cm" svg:height="1.523cm" svg:x="1.524cm" svg:y="0.889cm">
          <text:p text:style-name="P5"><text:span text:style-name="T24">Модульна структура системи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70" draw:text-style-name="P24" draw:layer="layout" svg:width="5.333cm" svg:height="4.317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49" draw:text-style-name="P20" draw:layer="layout" svg:width="5.333cm" svg:height="0.151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4" draw:text-style-name="P4" draw:layer="layout" svg:width="1.269cm" svg:height="1.269cm" svg:x="3.429cm" svg:y="3.556cm">
          <draw:image xlink:href="Pictures/100000010000010000000100C46693E5.png" xlink:type="simple" xlink:show="embed" xlink:actuate="onLoad" draw:mime-type="image/png">
            <text:p/>
          </draw:image>
          <svg:desc>preencoded.png</svg:desc>
        </draw:frame>
        <draw:custom-shape draw:name="Text 3" draw:style-name="gr71" draw:text-style-name="P19" draw:layer="layout" svg:width="4.825cm" svg:height="0.888cm" svg:x="1.778cm" svg:y="5.08cm">
          <text:p text:style-name="P17"><text:span text:style-name="T27">app.p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2" draw:text-style-name="P19" draw:layer="layout" svg:width="4.825cm" svg:height="1.015cm" svg:x="1.778cm" svg:y="5.969cm">
          <text:p text:style-name="P17"><text:span text:style-name="T23">Streamlit UI, координація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70" draw:text-style-name="P24" draw:layer="layout" svg:width="5.333cm" svg:height="4.317cm" svg:x="7.493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3" draw:text-style-name="P13" draw:layer="layout" svg:width="5.333cm" svg:height="0.151cm" svg:x="7.493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" draw:text-style-name="P4" draw:layer="layout" svg:width="1.269cm" svg:height="1.269cm" svg:x="9.398cm" svg:y="3.556cm">
          <draw:image xlink:href="Pictures/100000010000010000000100EFB236DF.png" xlink:type="simple" xlink:show="embed" xlink:actuate="onLoad" draw:mime-type="image/png">
            <text:p/>
          </draw:image>
          <svg:desc>preencoded.png</svg:desc>
        </draw:frame>
        <draw:custom-shape draw:name="Text 7" draw:style-name="gr73" draw:text-style-name="P19" draw:layer="layout" svg:width="4.825cm" svg:height="0.888cm" svg:x="7.747cm" svg:y="5.08cm">
          <text:p text:style-name="P17"><text:span text:style-name="T27">geocoder.p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74" draw:text-style-name="P19" draw:layer="layout" svg:width="4.825cm" svg:height="1.015cm" svg:x="7.747cm" svg:y="5.969cm">
          <text:p text:style-name="P17"><text:span text:style-name="T23">Геокодування адреси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70" draw:text-style-name="P24" draw:layer="layout" svg:width="5.333cm" svg:height="4.317cm" svg:x="13.462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3" draw:text-style-name="P13" draw:layer="layout" svg:width="5.333cm" svg:height="0.151cm" svg:x="13.462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" draw:text-style-name="P4" draw:layer="layout" svg:width="1.269cm" svg:height="1.269cm" svg:x="15.367cm" svg:y="3.556cm">
          <draw:image xlink:href="Pictures/100000010000010000000100EFB236DF.png" xlink:type="simple" xlink:show="embed" xlink:actuate="onLoad" draw:mime-type="image/png">
            <text:p/>
          </draw:image>
          <svg:desc>preencoded.png</svg:desc>
        </draw:frame>
        <draw:custom-shape draw:name="Text 11" draw:style-name="gr75" draw:text-style-name="P19" draw:layer="layout" svg:width="4.825cm" svg:height="0.888cm" svg:x="13.716cm" svg:y="5.08cm">
          <text:p text:style-name="P17"><text:span text:style-name="T27">graph_builder.p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76" draw:text-style-name="P19" draw:layer="layout" svg:width="4.825cm" svg:height="1.015cm" svg:x="13.716cm" svg:y="5.969cm">
          <text:p text:style-name="P17"><text:span text:style-name="T23">Побудування OSM-мережі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70" draw:text-style-name="P24" draw:layer="layout" svg:width="5.333cm" svg:height="4.317cm" svg:x="19.431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3" draw:text-style-name="P13" draw:layer="layout" svg:width="5.333cm" svg:height="0.151cm" svg:x="19.431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" draw:text-style-name="P4" draw:layer="layout" svg:width="1.269cm" svg:height="1.269cm" svg:x="21.336cm" svg:y="3.556cm">
          <draw:image xlink:href="Pictures/100000010000010000000100EFB236DF.png" xlink:type="simple" xlink:show="embed" xlink:actuate="onLoad" draw:mime-type="image/png">
            <text:p/>
          </draw:image>
          <svg:desc>preencoded.png</svg:desc>
        </draw:frame>
        <draw:custom-shape draw:name="Text 15" draw:style-name="gr77" draw:text-style-name="P19" draw:layer="layout" svg:width="4.825cm" svg:height="0.888cm" svg:x="19.685cm" svg:y="5.08cm">
          <text:p text:style-name="P17"><text:span text:style-name="T27">route_solver.p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78" draw:text-style-name="P19" draw:layer="layout" svg:width="4.825cm" svg:height="1.015cm" svg:x="19.685cm" svg:y="5.969cm">
          <text:p text:style-name="P17"><text:span text:style-name="T23">TSP алгоритми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70" draw:text-style-name="P24" draw:layer="layout" svg:width="5.333cm" svg:height="4.317cm" svg:x="1.524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3" draw:text-style-name="P13" draw:layer="layout" svg:width="5.333cm" svg:height="0.151cm" svg:x="1.524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" draw:text-style-name="P4" draw:layer="layout" svg:width="1.269cm" svg:height="1.269cm" svg:x="3.429cm" svg:y="8.89cm">
          <draw:image xlink:href="Pictures/100000010000010000000100EFB236DF.png" xlink:type="simple" xlink:show="embed" xlink:actuate="onLoad" draw:mime-type="image/png">
            <text:p/>
          </draw:image>
          <svg:desc>preencoded.png</svg:desc>
        </draw:frame>
        <draw:custom-shape draw:name="Text 19" draw:style-name="gr79" draw:text-style-name="P19" draw:layer="layout" svg:width="4.825cm" svg:height="0.888cm" svg:x="1.778cm" svg:y="10.414cm">
          <text:p text:style-name="P17"><text:span text:style-name="T27">vrp_solver.p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80" draw:text-style-name="P19" draw:layer="layout" svg:width="4.825cm" svg:height="1.015cm" svg:x="1.778cm" svg:y="11.303cm">
          <text:p text:style-name="P17"><text:span text:style-name="T23">VRP алгоритми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70" draw:text-style-name="P24" draw:layer="layout" svg:width="5.333cm" svg:height="4.317cm" svg:x="7.493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3" draw:text-style-name="P13" draw:layer="layout" svg:width="5.333cm" svg:height="0.151cm" svg:x="7.493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4" draw:text-style-name="P4" draw:layer="layout" svg:width="1.269cm" svg:height="1.269cm" svg:x="9.398cm" svg:y="8.89cm">
          <draw:image xlink:href="Pictures/100000010000010000000100EFB236DF.png" xlink:type="simple" xlink:show="embed" xlink:actuate="onLoad" draw:mime-type="image/png">
            <text:p/>
          </draw:image>
          <svg:desc>preencoded.png</svg:desc>
        </draw:frame>
        <draw:custom-shape draw:name="Text 23" draw:style-name="gr81" draw:text-style-name="P19" draw:layer="layout" svg:width="4.825cm" svg:height="0.888cm" svg:x="7.747cm" svg:y="10.414cm">
          <text:p text:style-name="P17"><text:span text:style-name="T27">visualizer.p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82" draw:text-style-name="P19" draw:layer="layout" svg:width="4.825cm" svg:height="1.015cm" svg:x="7.747cm" svg:y="11.303cm">
          <text:p text:style-name="P17"><text:span text:style-name="T23">Folium карта з анімацією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70" draw:text-style-name="P24" draw:layer="layout" svg:width="5.333cm" svg:height="4.317cm" svg:x="13.462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83" draw:text-style-name="P25" draw:layer="layout" svg:width="5.333cm" svg:height="0.151cm" svg:x="13.462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4" draw:text-style-name="P4" draw:layer="layout" svg:width="1.269cm" svg:height="1.269cm" svg:x="15.367cm" svg:y="8.89cm">
          <draw:image xlink:href="Pictures/1000000100000100000001002AA9B140.png" xlink:type="simple" xlink:show="embed" xlink:actuate="onLoad" draw:mime-type="image/png">
            <text:p/>
          </draw:image>
          <svg:desc>preencoded.png</svg:desc>
        </draw:frame>
        <draw:custom-shape draw:name="Text 27" draw:style-name="gr84" draw:text-style-name="P19" draw:layer="layout" svg:width="4.825cm" svg:height="0.888cm" svg:x="13.716cm" svg:y="10.414cm">
          <text:p text:style-name="P17"><text:span text:style-name="T27">package_db.p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85" draw:text-style-name="P19" draw:layer="layout" svg:width="4.825cm" svg:height="1.015cm" svg:x="13.716cm" svg:y="11.303cm">
          <text:p text:style-name="P17"><text:span text:style-name="T23">SQLite CRU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8" presentation:class="page"/>
          <draw:frame draw:name="Notes Placeholder 2" presentation:style-name="pr9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9" draw:style-name="dp3" draw:master-page-name="DEFAULT">
        <draw:custom-shape draw:name="Text 0" draw:style-name="gr86" draw:text-style-name="P6" draw:layer="layout" svg:width="22.859cm" svg:height="1.523cm" svg:x="1.524cm" svg:y="0.889cm">
          <text:p text:style-name="P5"><text:span text:style-name="T7">Технологічний стек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2" draw:text-style-name="P12" draw:layer="layout" svg:width="11.048cm" svg:height="4.571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4" draw:text-style-name="P4" draw:layer="layout" svg:width="1.269cm" svg:height="1.269cm" svg:x="2.032cm" svg:y="3.683cm">
          <draw:image xlink:href="Pictures/100000010000010000000100EFB236DF.png" xlink:type="simple" xlink:show="embed" xlink:actuate="onLoad" draw:mime-type="image/png">
            <text:p/>
          </draw:image>
          <svg:desc>preencoded.png</svg:desc>
        </draw:frame>
        <draw:custom-shape draw:name="Text 2" draw:style-name="gr87" draw:text-style-name="P6" draw:layer="layout" svg:width="8.381cm" svg:height="0.888cm" svg:x="3.683cm" svg:y="3.556cm">
          <text:p text:style-name="P5"><text:span text:style-name="T28">Мова та фреймворк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8" draw:text-style-name="P27" draw:layer="layout" svg:width="8.381cm" svg:height="2.539cm" svg:x="3.683cm" svg:y="4.572cm">
          <text:p text:style-name="P26"><text:span text:style-name="T15">Python 3.11</text:span></text:p>
          <text:p text:style-name="P26"><text:span text:style-name="T15">Streamlit (веб-інтерфейс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2" draw:text-style-name="P12" draw:layer="layout" svg:width="11.048cm" svg:height="4.571cm" svg:x="13.335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" draw:text-style-name="P4" draw:layer="layout" svg:width="1.269cm" svg:height="1.269cm" svg:x="13.843cm" svg:y="3.683cm">
          <draw:image xlink:href="Pictures/1000000100000100000001007758998D.png" xlink:type="simple" xlink:show="embed" xlink:actuate="onLoad" draw:mime-type="image/png">
            <text:p/>
          </draw:image>
          <svg:desc>preencoded.png</svg:desc>
        </draw:frame>
        <draw:custom-shape draw:name="Text 5" draw:style-name="gr89" draw:text-style-name="P6" draw:layer="layout" svg:width="8.381cm" svg:height="0.888cm" svg:x="15.494cm" svg:y="3.556cm">
          <text:p text:style-name="P5"><text:span text:style-name="T28">Геодані та графи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0" draw:text-style-name="P27" draw:layer="layout" svg:width="8.381cm" svg:height="2.539cm" svg:x="15.494cm" svg:y="4.572cm">
          <text:p text:style-name="P26"><text:span text:style-name="T15">OSMnx (мережа OSM)</text:span></text:p>
          <text:p text:style-name="P26"><text:span text:style-name="T15">NetworkX (алгоритми графів)</text:span></text:p>
          <text:p text:style-name="P26"><text:span text:style-name="T15">geopy / Nominatim (географічні дані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2" draw:text-style-name="P12" draw:layer="layout" svg:width="11.048cm" svg:height="4.571cm" svg:x="1.524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" draw:text-style-name="P4" draw:layer="layout" svg:width="1.269cm" svg:height="1.269cm" svg:x="2.032cm" svg:y="9.017cm">
          <draw:image xlink:href="Pictures/100000010000010000000100FF674785.png" xlink:type="simple" xlink:show="embed" xlink:actuate="onLoad" draw:mime-type="image/png">
            <text:p/>
          </draw:image>
          <svg:desc>preencoded.png</svg:desc>
        </draw:frame>
        <draw:custom-shape draw:name="Text 8" draw:style-name="gr91" draw:text-style-name="P6" draw:layer="layout" svg:width="8.381cm" svg:height="0.888cm" svg:x="3.683cm" svg:y="8.89cm">
          <text:p text:style-name="P5"><text:span text:style-name="T28">Візуалізація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92" draw:text-style-name="P27" draw:layer="layout" svg:width="8.381cm" svg:height="2.539cm" svg:x="3.683cm" svg:y="9.906cm">
          <text:p text:style-name="P26"><text:span text:style-name="T15">Folium</text:span></text:p>
          <text:p text:style-name="P26"><text:span text:style-name="T15">AntPath</text:span></text:p>
          <text:p text:style-name="P26"><text:span text:style-name="T15">(інтерактивні карти з анімацією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2" draw:text-style-name="P12" draw:layer="layout" svg:width="11.048cm" svg:height="4.571cm" svg:x="13.335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" draw:text-style-name="P4" draw:layer="layout" svg:width="1.269cm" svg:height="1.269cm" svg:x="13.843cm" svg:y="9.017cm">
          <draw:image xlink:href="Pictures/1000000100000100000001003EBEE120.png" xlink:type="simple" xlink:show="embed" xlink:actuate="onLoad" draw:mime-type="image/png">
            <text:p/>
          </draw:image>
          <svg:desc>preencoded.png</svg:desc>
        </draw:frame>
        <draw:custom-shape draw:name="Text 11" draw:style-name="gr93" draw:text-style-name="P6" draw:layer="layout" svg:width="8.381cm" svg:height="0.888cm" svg:x="15.494cm" svg:y="8.89cm">
          <text:p text:style-name="P5"><text:span text:style-name="T28">Алгоритми та БД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94" draw:text-style-name="P27" draw:layer="layout" svg:width="8.381cm" svg:height="2.539cm" svg:x="15.494cm" svg:y="9.906cm">
          <text:p text:style-name="P26"><text:span text:style-name="T15">scikit-learn</text:span></text:p>
          <text:p text:style-name="P26"><text:span text:style-name="T15">SQLite (база даних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9" presentation:class="page"/>
          <draw:frame draw:name="Notes Placeholder 2" presentation:style-name="pr10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0" draw:style-name="dp3" draw:master-page-name="DEFAULT">
        <draw:custom-shape draw:name="Text 0" draw:style-name="gr95" draw:text-style-name="P6" draw:layer="layout" svg:width="22.859cm" svg:height="1.523cm" svg:x="1.524cm" svg:y="0.889cm">
          <text:p text:style-name="P5"><text:span text:style-name="T24">Ключові алгоритми оптимізації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2" draw:text-style-name="P12" draw:layer="layout" svg:width="22.351cm" svg:height="2.793cm" svg:x="1.524cm" svg:y="2.9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3" draw:text-style-name="P13" draw:layer="layout" svg:width="1.523cm" svg:height="1.523cm" svg:x="2.159cm" svg:y="3.55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" draw:style-name="gr96" draw:text-style-name="P19" draw:layer="layout" svg:width="1.523cm" svg:height="1.523cm" svg:x="2.159cm" svg:y="3.556cm">
          <text:p text:style-name="P17"><text:span text:style-name="T29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97" draw:text-style-name="P6" draw:layer="layout" svg:width="8.889cm" svg:height="0.888cm" svg:x="4.318cm" svg:y="3.175cm">
          <text:p text:style-name="P5"><text:span text:style-name="T30">Nearest Neighbou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98" draw:text-style-name="P6" draw:layer="layout" svg:width="11.429cm" svg:height="1.396cm" svg:x="4.318cm" svg:y="4.064cm">
          <text:p text:style-name="P5"><text:span text:style-name="T15">Жадібний алгоритм, доцільно для 1–2 зупинок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99" draw:text-style-name="P16" draw:layer="layout" svg:width="2.539cm" svg:height="0.888cm" svg:x="18.288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00" draw:text-style-name="P19" draw:layer="layout" svg:width="2.539cm" svg:height="0.888cm" svg:x="18.288cm" svg:y="3.302cm">
          <text:p text:style-name="P17"><text:span text:style-name="T31">O(n²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01" draw:text-style-name="P24" draw:layer="layout" svg:width="4.571cm" svg:height="0.761cm" svg:x="18.288cm" svg:y="4.44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02" draw:text-style-name="P19" draw:layer="layout" svg:width="4.571cm" svg:height="0.761cm" svg:x="18.288cm" svg:y="4.445cm">
          <text:p text:style-name="P17"><text:span text:style-name="T32">n ≤ 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2" draw:text-style-name="P12" draw:layer="layout" svg:width="22.351cm" svg:height="2.793cm" svg:x="1.524cm" svg:y="5.96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3" draw:text-style-name="P13" draw:layer="layout" svg:width="1.523cm" svg:height="1.523cm" svg:x="2.159cm" svg:y="6.60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03" draw:text-style-name="P19" draw:layer="layout" svg:width="1.523cm" svg:height="1.523cm" svg:x="2.159cm" svg:y="6.604cm">
          <text:p text:style-name="P17"><text:span text:style-name="T29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04" draw:text-style-name="P6" draw:layer="layout" svg:width="8.889cm" svg:height="0.888cm" svg:x="4.318cm" svg:y="6.223cm">
          <text:p text:style-name="P5"><text:span text:style-name="T30">2-op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05" draw:text-style-name="P6" draw:layer="layout" svg:width="11.429cm" svg:height="1.396cm" svg:x="4.318cm" svg:y="7.112cm">
          <text:p text:style-name="P5"><text:span text:style-name="T15">Ітеративне покращення NN-розв'язку обміном ребер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99" draw:text-style-name="P16" draw:layer="layout" svg:width="2.539cm" svg:height="0.888cm" svg:x="18.288cm" svg:y="6.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06" draw:text-style-name="P19" draw:layer="layout" svg:width="2.539cm" svg:height="0.888cm" svg:x="18.288cm" svg:y="6.35cm">
          <text:p text:style-name="P17"><text:span text:style-name="T31">O(n³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01" draw:text-style-name="P24" draw:layer="layout" svg:width="4.571cm" svg:height="0.761cm" svg:x="18.288cm" svg:y="7.49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07" draw:text-style-name="P19" draw:layer="layout" svg:width="4.571cm" svg:height="0.761cm" svg:x="18.288cm" svg:y="7.493cm">
          <text:p text:style-name="P17"><text:span text:style-name="T32">3 ≤ n ≤ 2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2" draw:text-style-name="P12" draw:layer="layout" svg:width="22.351cm" svg:height="2.793cm" svg:x="1.524cm" svg:y="9.01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3" draw:text-style-name="P13" draw:layer="layout" svg:width="1.523cm" svg:height="1.523cm" svg:x="2.159cm" svg:y="9.65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1" draw:style-name="gr108" draw:text-style-name="P19" draw:layer="layout" svg:width="1.523cm" svg:height="1.523cm" svg:x="2.159cm" svg:y="9.652cm">
          <text:p text:style-name="P17"><text:span text:style-name="T29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09" draw:text-style-name="P6" draw:layer="layout" svg:width="8.889cm" svg:height="0.888cm" svg:x="4.318cm" svg:y="9.271cm">
          <text:p text:style-name="P5"><text:span text:style-name="T30">Генетичний алгоритм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10" draw:text-style-name="P6" draw:layer="layout" svg:width="11.429cm" svg:height="1.396cm" svg:x="4.318cm" svg:y="10.16cm">
          <text:p text:style-name="P5"><text:span text:style-name="T15">Order Crossover, елітизм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99" draw:text-style-name="P16" draw:layer="layout" svg:width="2.539cm" svg:height="0.888cm" svg:x="18.288cm" svg:y="9.39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11" draw:text-style-name="P19" draw:layer="layout" svg:width="2.539cm" svg:height="0.888cm" svg:x="18.288cm" svg:y="9.398cm">
          <text:p text:style-name="P17"><text:span text:style-name="T31">G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101" draw:text-style-name="P24" draw:layer="layout" svg:width="4.571cm" svg:height="0.761cm" svg:x="18.288cm" svg:y="10.54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12" draw:text-style-name="P19" draw:layer="layout" svg:width="4.571cm" svg:height="0.761cm" svg:x="18.288cm" svg:y="10.541cm">
          <text:p text:style-name="P17"><text:span text:style-name="T32">n &gt; 2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113" draw:text-style-name="P16" draw:layer="layout" svg:width="22.351cm" svg:height="2.158cm" svg:x="1.524cm" svg:y="11.43cm">
          <text:p text:style-name="P28"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4" draw:text-style-name="P4" draw:layer="layout" svg:width="1.142cm" svg:height="1.142cm" svg:x="2.286cm" svg:y="11.735cm">
          <draw:image xlink:href="Pictures/1000000100000100000001004A26C9B7.png" xlink:type="simple" xlink:show="embed" xlink:actuate="onLoad" draw:mime-type="image/png">
            <text:p/>
          </draw:image>
          <svg:desc>preencoded.png</svg:desc>
        </draw:frame>
        <draw:custom-shape draw:name="Text 29" draw:style-name="gr114" draw:text-style-name="P6" draw:layer="layout" svg:width="10.159cm" svg:height="0.761cm" svg:x="3.937cm" svg:y="11.557cm">
          <text:p text:style-name="P5"><text:span text:style-name="T33">Механізм «останньої милі»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115" draw:text-style-name="P6" draw:layer="layout" svg:width="17.779cm" svg:height="0.888cm" svg:x="3.937cm" svg:y="12.319cm">
          <text:p text:style-name="P5"><text:span text:style-name="T34">Якщо відсутній прямий доступ до адреси доставки, автомобіль паркується на найближчому вузлі, залишок шляху кур’єр проходить пішки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10" presentation:class="page"/>
          <draw:frame draw:name="Notes Placeholder 2" presentation:style-name="pr1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1" draw:style-name="dp3" draw:master-page-name="DEFAULT">
        <draw:custom-shape draw:name="Text 0" draw:style-name="gr116" draw:text-style-name="P6" draw:layer="layout" svg:width="22.859cm" svg:height="1.523cm" svg:x="1.524cm" svg:y="0.889cm">
          <text:p text:style-name="P5"><text:span text:style-name="T7">Архітектура розгортання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2" draw:text-style-name="P12" draw:layer="layout" svg:width="7.238cm" svg:height="8.889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49" draw:text-style-name="P20" draw:layer="layout" svg:width="7.238cm" svg:height="0.177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4" draw:text-style-name="P4" draw:layer="layout" svg:width="1.65cm" svg:height="1.65cm" svg:x="4.191cm" svg:y="3.81cm">
          <draw:image xlink:href="Pictures/100000010000010000000100AFB1BC56.png" xlink:type="simple" xlink:show="embed" xlink:actuate="onLoad" draw:mime-type="image/png">
            <text:p/>
          </draw:image>
          <svg:desc>preencoded.png</svg:desc>
        </draw:frame>
        <draw:custom-shape draw:name="Text 3" draw:style-name="gr117" draw:text-style-name="P19" draw:layer="layout" svg:width="6.476cm" svg:height="1.015cm" svg:x="1.905cm" svg:y="5.842cm">
          <text:p text:style-name="P17"><text:span text:style-name="T20">Клієнтський пристрій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18" draw:text-style-name="P30" draw:layer="layout" svg:width="6.476cm" svg:height="4.063cm" svg:x="1.905cm" svg:y="7.112cm">
          <text:p text:style-name="P29"><text:span text:style-name="T35">Веб-браузер (Chrome/Firefox)</text:span></text:p>
          <text:p text:style-name="P29"><text:span text:style-name="T35">HTTP / WebSocke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2" draw:text-style-name="P12" draw:layer="layout" svg:width="7.238cm" svg:height="8.889cm" svg:x="9.525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3" draw:text-style-name="P13" draw:layer="layout" svg:width="7.238cm" svg:height="0.177cm" svg:x="9.525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" draw:text-style-name="P4" draw:layer="layout" svg:width="1.65cm" svg:height="1.65cm" svg:x="12.192cm" svg:y="3.81cm">
          <draw:image xlink:href="Pictures/10000001000001000000010077E5F49F.png" xlink:type="simple" xlink:show="embed" xlink:actuate="onLoad" draw:mime-type="image/png">
            <text:p/>
          </draw:image>
          <svg:desc>preencoded.png</svg:desc>
        </draw:frame>
        <draw:custom-shape draw:name="Text 7" draw:style-name="gr119" draw:text-style-name="P19" draw:layer="layout" svg:width="6.476cm" svg:height="1.015cm" svg:x="9.906cm" svg:y="5.842cm">
          <text:p text:style-name="P17"><text:span text:style-name="T20">Сервер додатку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20" draw:text-style-name="P30" draw:layer="layout" svg:width="6.476cm" svg:height="4.063cm" svg:x="9.906cm" svg:y="7.112cm">
          <text:p text:style-name="P29"><text:span text:style-name="T35">Python 3.11</text:span></text:p>
          <text:p text:style-name="P29"><text:span text:style-name="T35">Streamlit Server</text:span></text:p>
          <text:p text:style-name="P29"><text:span text:style-name="T35">SQLi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2" draw:text-style-name="P12" draw:layer="layout" svg:width="7.238cm" svg:height="8.889cm" svg:x="17.526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83" draw:text-style-name="P25" draw:layer="layout" svg:width="7.238cm" svg:height="0.177cm" svg:x="17.526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" draw:text-style-name="P4" draw:layer="layout" svg:width="1.65cm" svg:height="1.65cm" svg:x="20.193cm" svg:y="3.81cm">
          <draw:image xlink:href="Pictures/100000010000010000000100C79130FB.png" xlink:type="simple" xlink:show="embed" xlink:actuate="onLoad" draw:mime-type="image/png">
            <text:p/>
          </draw:image>
          <svg:desc>preencoded.png</svg:desc>
        </draw:frame>
        <draw:custom-shape draw:name="Text 11" draw:style-name="gr121" draw:text-style-name="P19" draw:layer="layout" svg:width="6.476cm" svg:height="1.015cm" svg:x="17.907cm" svg:y="5.842cm">
          <text:p text:style-name="P17"><text:span text:style-name="T20">Зовнішні хмарні сервіси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22" draw:text-style-name="P30" draw:layer="layout" svg:width="6.476cm" svg:height="4.063cm" svg:x="17.907cm" svg:y="7.112cm">
          <text:p text:style-name="P29"><text:span text:style-name="T35">OpenStreetMap: Nominatim + Overpass</text:span></text:p>
          <text:p text:style-name="P29"><text:span text:style-name="T35">Mapbox AP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11" presentation:class="page"/>
          <draw:frame draw:name="Notes Placeholder 2" presentation:style-name="pr1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2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3" draw:text-style-name="P6" draw:layer="layout" svg:width="22.859cm" svg:height="1.777cm" svg:x="1.778cm" svg:y="1.27cm">
          <text:p text:style-name="P5"><text:span text:style-name="T36">Висновки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24" draw:text-style-name="P6" draw:layer="layout" svg:width="20.319cm" svg:height="1.269cm" svg:x="3.048cm" svg:y="3.302cm">
          <text:p text:style-name="P5"><text:span text:style-name="T37">Спроєктовано ІС для оптимізації розподілу вантажів з використанням ООП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25" draw:text-style-name="P6" draw:layer="layout" svg:width="20.319cm" svg:height="1.269cm" svg:x="3.048cm" svg:y="5.08cm">
          <text:p text:style-name="P5"><text:span text:style-name="T37">Побудовано 10 UML-діаграм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6" draw:text-style-name="P6" draw:layer="layout" svg:width="20.319cm" svg:height="1.269cm" svg:x="3.048cm" svg:y="6.858cm">
          <text:p text:style-name="P5"><text:span text:style-name="T37">Реалізовано мультимодальну маршрутизацію на реальних даних OS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27" draw:text-style-name="P6" draw:layer="layout" svg:width="20.319cm" svg:height="1.269cm" svg:x="3.048cm" svg:y="8.636cm">
          <text:p text:style-name="P5"><text:span text:style-name="T37">Алгоритми вибору алгоритму оптимізації залежно від складності задачі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28" draw:text-style-name="P6" draw:layer="layout" svg:width="20.319cm" svg:height="1.269cm" svg:x="3.048cm" svg:y="10.414cm">
          <text:p text:style-name="P5"><text:span text:style-name="T37">Розроблена документація є основою для реалізації, тестування та супроводу системи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12" presentation:class="page"/>
          <draw:frame draw:name="Notes Placeholder 2" presentation:style-name="pr1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DeliveryIQ – Оптимізація розподілу вантажів</dc:title>
    <dc:subject>PptxGenJS Presentation</dc:subject>
    <meta:initial-creator>Ніколаєв Т.О.</meta:initial-creator>
    <meta:editing-cycles>43</meta:editing-cycles>
    <meta:creation-date>2026-04-26T15:36:43</meta:creation-date>
    <dc:date>2026-04-26T20:06:12.387142600</dc:date>
    <meta:editing-duration>PT1H2M45S</meta:editing-duration>
    <meta:generator>LibreOffice/26.2.1.2$Windows_X86_64 LibreOffice_project/620$Build-2</meta:generator>
    <meta:print-date>2026-04-26T20:05:28.001386900</meta:print-date>
    <meta:printed-by>PDF files</meta:printed-by>
    <meta:document-statistic meta:object-count="261"/>
    <meta:user-defined meta:name="AppVersion">16.0000</meta:user-defined>
    <meta:user-defined meta:name="Company">PptxGenJS</meta:user-defined>
    <meta:user-defined meta:name="Notes" meta:value-type="float">12</meta:user-defined>
    <meta:user-defined meta:name="PresentationFormat">On-screen Show (16:9)</meta:user-defined>
    <meta:user-defined meta:name="Slides" meta:value-type="float">12</meta:user-defined>
  </office:meta>
</office:document-meta>
</file>